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Google Sans1" svg:font-family="'Google Sans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table:align="left" style:writing-mode="lr-tb"/>
    </style:style>
    <style:style style:name="Table1.A" style:family="table-column">
      <style:table-column-properties style:column-width="1.8938in"/>
    </style:style>
    <style:style style:name="Table1.B" style:family="table-column">
      <style:table-column-properties style:column-width="2.1285in"/>
    </style:style>
    <style:style style:name="Table1.C" style:family="table-column">
      <style:table-column-properties style:column-width="1.9778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Title">
      <style:text-properties style:font-name="Google Sans1"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Heading_20_1">
      <style:text-properties fo:font-size="12pt" style:font-size-asian="12pt" style:font-size-complex="12pt"/>
    </style:style>
    <style:style style:name="P4" style:family="paragraph" style:parent-style-name="Quote">
      <style:text-properties fo:font-size="12pt" style:font-size-asian="12pt" style:font-size-complex="12pt"/>
    </style:style>
    <style:style style:name="P5" style:family="paragraph" style:parent-style-name="Quote">
      <loext:graphic-properties draw:fill="solid" draw:fill-color="#282a36" draw:opacity="100%"/>
      <style:paragraph-properties ch2_options="{'Style': 'dracula', 'Language': 'JavaScript', 'UseCharStyles': 0, 'PreviewOnStart': 0, 'CustomStylePath': '$(user)/codehighlighter2/styles', 'LineNumberRatio': 100, 'LineNumberStart': 1, 'MasterCharStyle': '', 'ShowLineNumbers': 0, 'ColourizeBackground': 1, 'LineNumberSeparator': '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officeooo:paragraph-rsid="00102884" fo:background-color="transparent" style:font-size-asian="12pt" style:font-size-complex="12pt">
        <loext:char-complex-color loext:theme-type="dark1" loext:color-type="theme"/>
      </style:text-properties>
    </style:style>
    <style:style style:name="P6" style:family="paragraph" style:parent-style-name="Quote">
      <loext:graphic-properties draw:fill="solid" draw:fill-color="#282a36" draw:opacity="100%"/>
      <style:paragraph-properties ch2_options="{'Style': 'dracula', 'Language': 'JavaScript', 'UseCharStyles': 0, 'PreviewOnStart': 0, 'CustomStylePath': '$(user)/codehighlighter2/styles', 'LineNumberRatio': 100, 'LineNumberStart': 1, 'MasterCharStyle': '', 'ShowLineNumbers': 0, 'ColourizeBackground': 1, 'LineNumberSeparator': ' ', 'LineNumberPaddingSymbol': '', 'StoreOptionsWithSnippet': 1}" fo:background-color="#282a36"/>
      <style:text-properties fo:color="#f8f8f2" loext:opacity="100%" fo:font-size="12pt" fo:language="zxx" fo:country="none" fo:font-style="normal" style:text-underline-style="none" fo:font-weight="normal" officeooo:paragraph-rsid="00102884" fo:background-color="transparent" style:font-size-asian="12pt" style:font-size-complex="12pt"/>
    </style:style>
    <style:style style:name="P7" style:family="paragraph" style:parent-style-name="Quote">
      <style:text-properties fo:font-size="12pt" officeooo:paragraph-rsid="00102884" style:font-size-asian="12pt" style:font-size-complex="12pt"/>
    </style:style>
    <style:style style:name="P8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" fo:font-size="12pt" style:font-size-asian="12pt" style:font-size-complex="12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size="12pt" fo:font-weight="bold" style:font-size-asian="12pt" style:font-size-complex="12pt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size="12pt" style:font-size-asian="12pt" style:font-size-complex="12pt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13" style:family="paragraph" style:parent-style-name="Heading_20_3">
      <style:paragraph-properties fo:margin-top="0in" fo:margin-bottom="0.139in" style:contextual-spacing="false"/>
      <style:text-properties style:font-name="Google Sans1" fo:font-size="12pt" style:font-size-asian="12pt" style:font-size-complex="12pt"/>
    </style:style>
    <style:style style:name="P14" style:family="paragraph" style:parent-style-name="Text_20_body">
      <style:paragraph-properties fo:margin-top="0in" fo:margin-bottom="0.139in" style:contextual-spacing="false"/>
      <style:text-properties fo:font-size="12pt" style:font-size-asian="12pt" style:font-size-complex="12pt"/>
    </style:style>
    <style:style style:name="T1" style:family="text">
      <style:text-properties style:font-name="Google Sans1"/>
    </style:style>
    <style:style style:name="T2" style:family="text">
      <style:text-properties fo:color="#ff79c6" loext:opacity="100%">
        <loext:char-complex-color loext:theme-type="dark1" loext:color-type="theme"/>
      </style:text-properties>
    </style:style>
    <style:style style:name="T3" style:family="text">
      <style:text-properties fo:color="#f8f8f2" loext:opacity="100%">
        <loext:char-complex-color loext:theme-type="dark1" loext:color-type="theme"/>
      </style:text-properties>
    </style:style>
    <style:style style:name="T4" style:family="text">
      <style:text-properties fo:color="#bd93f9" loext:opacity="100%">
        <loext:char-complex-color loext:theme-type="dark1" loext:color-type="theme"/>
      </style:text-properties>
    </style:style>
    <style:style style:name="T5" style:family="text">
      <style:text-properties fo:color="#f8f8f2" loext:opacity="100%"/>
    </style:style>
    <style:style style:name="T6" style:family="text">
      <style:text-properties fo:color="#8be9fd" loext:opacity="100%" fo:font-style="italic">
        <loext:char-complex-color loext:theme-type="dark1" loext:color-type="theme"/>
      </style:text-properties>
    </style:style>
    <style:style style:name="T7" style:family="text">
      <style:text-properties style:font-name="Google Sans Text" fo:font-size="12pt" style:font-size-asian="12pt" style:font-size-complex="12pt"/>
    </style:style>
    <style:style style:name="T8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rnizing React Development: UMD vs. Import Maps</text:p>
      <text:p text:style-name="P2">This document outlines the two primary approaches for integrating React via CDN: the traditional UMD pattern and the modern ESM approach using Import Maps.</text:p>
      <text:h text:style-name="P3" text:outline-level="1">1. <text:span text:style-name="T1">The UMD Approach (Traditional)</text:span></text:h>
      <text:p text:style-name="P2">The UMD pattern uses global script tags to attach React to the window object.</text:p>
      <text:p text:style-name="P4"/>
      <text:p text:style-name="P5"><text:span text:style-name="T2">&lt;</text:span><text:span text:style-name="T3">script src</text:span><text:span text:style-name="T2">=</text:span><text:span text:style-name="T4">"https://unpkg.com/react@18/umd/react.production.min.js"</text:span><text:span text:style-name="T2">&gt;&lt;</text:span><text:span text:style-name="T3">/script&gt;</text:span></text:p>
      <text:p text:style-name="P5"><text:span text:style-name="T2">&lt;</text:span><text:span text:style-name="T3">script src</text:span><text:span text:style-name="T2">=</text:span><text:span text:style-name="T4">"https://unpkg.com/react-dom@18/umd/react-dom.production.min.js"</text:span><text:span text:style-name="T2">&gt;&lt;</text:span><text:span text:style-name="T3">/script&gt;</text:span></text:p>
      <text:p text:style-name="P5"><text:span text:style-name="T2">&lt;</text:span><text:span text:style-name="T3">script src</text:span><text:span text:style-name="T2">=</text:span><text:span text:style-name="T4">"https://unpkg.com/@babel/standalone/babel.min.js"</text:span><text:span text:style-name="T2">&gt;&lt;</text:span><text:span text:style-name="T3">/script&gt;</text:span></text:p>
      <text:p text:style-name="P6"/>
      <text:p text:style-name="P5"><text:span text:style-name="T2">&lt;</text:span><text:span text:style-name="T3">script type</text:span><text:span text:style-name="T2">=</text:span><text:span text:style-name="T4">'text/babel'</text:span><text:span text:style-name="T2">&gt;</text:span></text:p>
      <text:p text:style-name="P5"><text:span text:style-name="T5"><text:s text:c="2"/></text:span><text:span text:style-name="T6">const</text:span><text:span text:style-name="T3"> App </text:span><text:span text:style-name="T2">=</text:span><text:span text:style-name="T3"> () =&gt; </text:span><text:span text:style-name="T2">&lt;</text:span><text:span text:style-name="T3">h1</text:span><text:span text:style-name="T2">&gt;</text:span><text:span text:style-name="T3">Hello UMD</text:span><text:span text:style-name="T2">!&lt;</text:span><text:span text:style-name="T3">/h1&gt;;</text:span></text:p>
      <text:p text:style-name="P5"><text:span text:style-name="T3"><text:s text:c="2"/>ReactDOM.createRoot(</text:span><text:span text:style-name="T6">document</text:span><text:span text:style-name="T3">.getElementById(</text:span><text:span text:style-name="T4">"root"</text:span><text:span text:style-name="T3">)).render(</text:span><text:span text:style-name="T2">&lt;</text:span><text:span text:style-name="T3">App </text:span><text:span text:style-name="T2">/&gt;</text:span><text:span text:style-name="T3">);</text:span></text:p>
      <text:p text:style-name="P5"><text:span text:style-name="T2">&lt;</text:span><text:span text:style-name="T3">/script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4"/></text:p>
      <text:h text:style-name="P3" text:outline-level="1"><text:soft-page-break/>2. <text:span text:style-name="T1">The ESM Approach (Import Maps)</text:span></text:h>
      <text:p text:style-name="P2">Import maps allow clean, standard ES module imports.</text:p>
      <text:p text:style-name="P4"/>
      <text:p text:style-name="P5"><text:span text:style-name="T2">&lt;</text:span><text:span text:style-name="T3">script type</text:span><text:span text:style-name="T2">=</text:span><text:span text:style-name="T4">"importmap"</text:span><text:span text:style-name="T2">&gt;</text:span></text:p>
      <text:p text:style-name="P5"><text:span text:style-name="T5"><text:s/></text:span><text:span text:style-name="T3">{</text:span></text:p>
      <text:p text:style-name="P5"><text:span text:style-name="T5"><text:s/></text:span><text:span text:style-name="T4">"imports"</text:span><text:span text:style-name="T2">:</text:span><text:span text:style-name="T3"> {</text:span></text:p>
      <text:p text:style-name="P5"><text:span text:style-name="T5"><text:s/></text:span><text:span text:style-name="T4">"react"</text:span><text:span text:style-name="T2">:</text:span><text:span text:style-name="T3"> </text:span><text:span text:style-name="T4">"https://esm.sh/react@18.3.1"</text:span><text:span text:style-name="T3">,</text:span></text:p>
      <text:p text:style-name="P5"><text:span text:style-name="T5"><text:s/></text:span><text:span text:style-name="T4">"react-dom/client"</text:span><text:span text:style-name="T2">:</text:span><text:span text:style-name="T3"> </text:span><text:span text:style-name="T4">"https://esm.sh/react-dom@18.3.1/client"</text:span></text:p>
      <text:p text:style-name="P5"><text:span text:style-name="T5"><text:s/></text:span><text:span text:style-name="T3">}</text:span></text:p>
      <text:p text:style-name="P5"><text:span text:style-name="T5"><text:s/></text:span><text:span text:style-name="T3">}</text:span></text:p>
      <text:p text:style-name="P5"><text:span text:style-name="T2">&lt;</text:span><text:span text:style-name="T3">/script&gt;</text:span></text:p>
      <text:p text:style-name="P6"/>
      <text:p text:style-name="P5"><text:span text:style-name="T2">&lt;</text:span><text:span text:style-name="T3">script type</text:span><text:span text:style-name="T2">=</text:span><text:span text:style-name="T4">"module"</text:span><text:span text:style-name="T2">&gt;</text:span></text:p>
      <text:p text:style-name="P5"><text:span text:style-name="T5"><text:s/></text:span><text:span text:style-name="T2">import</text:span><text:span text:style-name="T3"> React </text:span><text:span text:style-name="T2">from</text:span><text:span text:style-name="T3"> </text:span><text:span text:style-name="T4">'react'</text:span><text:span text:style-name="T3">;</text:span></text:p>
      <text:p text:style-name="P5"><text:span text:style-name="T5"><text:s/></text:span><text:span text:style-name="T2">import</text:span><text:span text:style-name="T3"> { createRoot } </text:span><text:span text:style-name="T2">from</text:span><text:span text:style-name="T3"> </text:span><text:span text:style-name="T4">'react-dom/client'</text:span><text:span text:style-name="T3">;</text:span></text:p>
      <text:p text:style-name="P5"><text:span text:style-name="T5"><text:s/></text:span><text:span text:style-name="T6">const</text:span><text:span text:style-name="T3"> App </text:span><text:span text:style-name="T2">=</text:span><text:span text:style-name="T3"> () =&gt; </text:span><text:span text:style-name="T2">&lt;</text:span><text:span text:style-name="T3">h1</text:span><text:span text:style-name="T2">&gt;</text:span><text:span text:style-name="T3">Hello ESM</text:span><text:span text:style-name="T2">!&lt;</text:span><text:span text:style-name="T3">/h1&gt;;</text:span></text:p>
      <text:p text:style-name="P5"><text:span text:style-name="T3"><text:s/>createRoot(</text:span><text:span text:style-name="T6">document</text:span><text:span text:style-name="T3">.getElementById(</text:span><text:span text:style-name="T4">'root'</text:span><text:span text:style-name="T3">)).render(</text:span><text:span text:style-name="T2">&lt;</text:span><text:span text:style-name="T3">App </text:span><text:span text:style-name="T2">/&gt;</text:span><text:span text:style-name="T3">);</text:span></text:p>
      <text:p text:style-name="P5"><text:span text:style-name="T2">&lt;</text:span><text:span text:style-name="T3">/script&gt;</text:span></text:p>
      <text:p text:style-name="P7"><text:s text:c="4"/></text:p>
      <text:h text:style-name="P8" text:outline-level="3"><text:soft-page-break/></text:h>
      <text:h text:style-name="P8" text:outline-level="3"/>
      <text:h text:style-name="P8" text:outline-level="3"/>
      <text:h text:style-name="P8" text:outline-level="3">Comparison at a Glanc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<text:span text:style-name="Strong_20_Emphasis"><text:span text:style-name="T7">Feature</text:span></text:span></text:p>
            </table:table-cell>
            <table:table-cell table:style-name="Table1.A1" office:value-type="string">
              <text:p text:style-name="P9"><text:span text:style-name="Strong_20_Emphasis"><text:span text:style-name="T7">UMD (Global)</text:span></text:span></text:p>
            </table:table-cell>
            <table:table-cell table:style-name="Table1.A1" office:value-type="string">
              <text:p text:style-name="P9"><text:span text:style-name="Strong_20_Emphasis"><text:span text:style-name="T7">ES Modules (Import Maps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Dependency Management</text:p>
          </table:table-cell>
          <table:table-cell table:style-name="Table1.A1" office:value-type="string">
            <text:p text:style-name="P11">Manual (via script order)</text:p>
          </table:table-cell>
          <table:table-cell table:style-name="Table1.A1" office:value-type="string">
            <text:p text:style-name="P11">Automated (via Import Map)</text:p>
          </table:table-cell>
        </table:table-row>
        <table:table-row>
          <table:table-cell table:style-name="Table1.A1" office:value-type="string">
            <text:p text:style-name="P10">Scope</text:p>
          </table:table-cell>
          <table:table-cell table:style-name="Table1.A1" office:value-type="string">
            <text:p text:style-name="P12"><text:span text:style-name="T7">Pollutes the </text:span><text:span text:style-name="Source_20_Text"><text:span text:style-name="T7">window</text:span></text:span><text:span text:style-name="T7"> object</text:span></text:p>
          </table:table-cell>
          <table:table-cell table:style-name="Table1.A1" office:value-type="string">
            <text:p text:style-name="P11">Isolated module scope</text:p>
          </table:table-cell>
        </table:table-row>
        <table:table-row>
          <table:table-cell table:style-name="Table1.A1" office:value-type="string">
            <text:p text:style-name="P10">Complexity</text:p>
          </table:table-cell>
          <table:table-cell table:style-name="Table1.A1" office:value-type="string">
            <text:p text:style-name="P11">Extremely Low</text:p>
          </table:table-cell>
          <table:table-cell table:style-name="Table1.A1" office:value-type="string">
            <text:p text:style-name="P11">Moderate (Modern Standard)</text:p>
          </table:table-cell>
        </table:table-row>
        <table:table-row>
          <table:table-cell table:style-name="Table1.A1" office:value-type="string">
            <text:p text:style-name="P10">Scalability</text:p>
          </table:table-cell>
          <table:table-cell table:style-name="Table1.A1" office:value-type="string">
            <text:p text:style-name="P11">Poor (Hard to manage multi-file)</text:p>
          </table:table-cell>
          <table:table-cell table:style-name="Table1.A1" office:value-type="string">
            <text:p text:style-name="P11">High (Modular design)</text:p>
          </table:table-cell>
        </table:table-row>
      </table:table>
      <text:p text:style-name="P2"/>
      <text:h text:style-name="P13" text:outline-level="3">Final Recommendation</text:h>
      <text:p text:style-name="P14">For simple experiments and single-page learning exercises, the <text:span text:style-name="T8">UMD pattern</text:span> remains an excellent, frictionless choice. However, if you intend to structure your project into multiple files or develop a more robust architectural foundation, transitioning to <text:span text:style-name="T8">ES Modules with Import Maps</text:span> is the recommended professional path.</text:p>
      <text:p text:style-name="P14">If your project continues to grow in complexity, remember that build tools like <text:span text:style-name="T8">Vite</text:span> remain the industry standard. They provide critical production optimizations—such as minification, TypeScript support, and Hot Module Replacement (HMR)—that CDN-based workflows simply cannot replicate.</text:p>
      <text:p text:style-name="P14">Are you currently developing a single-page prototype, or are you looking to structure your project for long-term growth?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Google Sans1" svg:font-family="'Google Sans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6-15T09:36:42.406791700</dc:date>
    <meta:editing-duration>PT3M10S</meta:editing-duration>
    <meta:generator>LibreOffice/26.2.3.2$Windows_X86_64 LibreOffice_project/70e089b17412e4cb7773e41413306b17a2328c34</meta:generator>
    <meta:document-statistic meta:table-count="1" meta:image-count="0" meta:object-count="0" meta:page-count="3" meta:paragraph-count="49" meta:word-count="264" meta:character-count="2197" meta:non-whitespace-character-count="1960"/>
    <meta:user-defined meta:name="AppVersion">14.0000</meta:user-defined>
    <meta:template xlink:type="simple" xlink:actuate="onRequest" xlink:title="Normal.dotm" xlink:href=""/>
  </office:meta>
</office:document-meta>
</file>