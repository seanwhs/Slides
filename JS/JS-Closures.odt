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text-properties officeooo:paragraph-rsid="000645b2"/>
    </style:style>
    <style:style style:name="P2" style:family="paragraph" style:parent-style-name="Source_20_Code">
      <style:text-properties officeooo:paragraph-rsid="000645b2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brain-the-one-truth-anchor-this-first"/>🧠 The ONE Truth (Anchor This First)</text:h>
      <text:p text:style-name="Block_20_Text">A closure is just a function that <text:span text:style-name="T1">remembers variables from where it was created</text:span></text:p>
      <text:p text:style-name="Standard">Everything else is just explanation.</text:p>
      <text:h text:style-name="Heading_20_1" text:outline-level="1"><text:bookmark-end text:name="brain-the-one-truth-anchor-this-first"/><text:bookmark-start text:name="X7c2648d7c3a1d33a858caddc9f6e39767837f78"/>🎒 PART 1 — The “Backpack That Refuses to Let Go”</text:h>
      <text:p text:style-name="Standard">Let’s sharpen your metaphor:</text:p>
      <text:p text:style-name="Block_20_Text">A closure is a function that <text:span text:style-name="T1">refuses to let go of its childhood home</text:span></text:p>
      <text:h text:style-name="Heading_20_2" text:outline-level="2"><text:bookmark-start text:name="X9acc25f5d9645e590e609e050263edec15170c2"/>🧒 Story Version (This helps more than code)</text:h>
      <text:p text:style-name="Source_20_Code"><text:span text:style-name="KeywordTok">function</text:span><text:span text:style-name="NormalTok"> </text:span><text:span text:style-name="FunctionTok">parent</text:span><text:span text:style-name="NormalTok">() {</text:span><text:line-break/><text:span text:style-name="NormalTok"> <text:s/></text:span><text:span text:style-name="KeywordTok">let</text:span><text:span text:style-name="NormalTok"> secret </text:span><text:span text:style-name="OperatorTok">=</text:span><text:span text:style-name="NormalTok"> </text:span><text:span text:style-name="StringTok">"I love JS"</text:span><text:span text:style-name="OperatorTok">;</text:span><text:line-break/><text:line-break/><text:span text:style-name="NormalTok"> <text:s/></text:span><text:span text:style-name="KeywordTok">function</text:span><text:span text:style-name="NormalTok"> </text:span><text:span text:style-name="FunctionTok">child</text:span><text:span text:style-name="NormalTok">() {</text:span><text:line-break/><text:span text:style-name="NormalTok"> <text:s text:c="3"/></text:span><text:span text:style-name="BuiltInTok">console</text:span><text:span text:style-name="OperatorTok">.</text:span><text:span text:style-name="FunctionTok">log</text:span><text:span text:style-name="NormalTok">(secret)</text:span><text:span text:style-name="OperatorTok">;</text:span><text:line-break/><text:span text:style-name="NormalTok"> <text:s/>}</text:span><text:line-break/><text:line-break/><text:span text:style-name="NormalTok"> <text:s/></text:span><text:span text:style-name="ControlFlowTok">return</text:span><text:span text:style-name="NormalTok"> child</text:span><text:span text:style-name="OperatorTok">;</text:span><text:line-break/><text:span text:style-name="NormalTok">}</text:span></text:p>
      <text:p text:style-name="Standard">👉 What happens?</text:p>
      <text:p text:style-name="Standard">child is born inside parent</text:p>
      <text:p text:style-name="Standard">It grows up seeing secret</text:p>
      <text:p text:style-name="Standard">Then it leaves home (return child)<text:bookmark-end text:name="X9acc25f5d9645e590e609e050263edec15170c2"/></text:p>
      <text:h text:style-name="Heading_20_2" text:outline-level="2"><text:bookmark-start text:name="question-question"/>❓ Question</text:h>
      <text:p text:style-name="Standard">Should secret disappear when parent() ends?</text:p>
      <text:p text:style-name="Text_20_body">👉 Normally: YES<text:line-break/>👉 But here: NO<text:bookmark-end text:name="question-question"/></text:p>
      <text:h text:style-name="Heading_20_2" text:outline-level="2"><text:bookmark-start text:name="school_satchel-why"/>🎒 Why?</text:h>
      <text:p text:style-name="Standard">Because:</text:p>
      <text:p text:style-name="Block_20_Text">The child <text:span text:style-name="T1">takes a backpack</text:span> with secret inside<text:bookmark-end text:name="school_satchel-why"/></text:p>
      <text:p text:style-name="Block_20_Text"/>
      <text:h text:style-name="P1" text:outline-level="2"><text:bookmark-start text:name="visual"/><text:soft-page-break/>Visual</text:h>
      <text:p text:style-name="Source_20_Code">child function:<text:line-break/> <text:s/>code: console.log(secret)<text:line-break/><text:line-break/> <text:s/>🎒 backpack:<text:line-break/> <text:s text:c="3"/>secret = "I love JS"</text:p>
      <text:p text:style-name="Standard"><text:bookmark-end text:name="X7c2648d7c3a1d33a858caddc9f6e39767837f78"/><text:bookmark-end text:name="visual"/></text:p>
      <text:h text:style-name="Heading_20_1" text:outline-level="1"><text:bookmark-start text:name="Xfd3e7f3d6edd134f1bfdbecb8a079335e17b26b"/>🎨 PART 2 — Correcting the “Memory Model” (Important Clarification)</text:h>
      <text:p text:style-name="Standard">Your earlier explanation used Stack vs Heap. That’s useful — but beginners can get stuck thinking too literally.</text:p>
      <text:p text:style-name="Text_20_body">Let’s refine it:</text:p>
      <text:h text:style-name="Heading_20_2" text:outline-level="2"><text:bookmark-start text:name="white_check_mark-better-beginner-rule"/>✅ Better Beginner Rule</text:h>
      <text:p text:style-name="Standard">Functions run temporarily</text:p>
      <text:p text:style-name="Standard">BUT if a function <text:span text:style-name="T1">needs a variable later</text:span>, JavaScript keeps it alive</text:p>
      <text:p text:style-name="Standard">👉 You don’t need to memorize stack/heap to understand closures<text:bookmark-end text:name="white_check_mark-better-beginner-rule"/></text:p>
      <text:h text:style-name="Heading_20_2" text:outline-level="2"><text:bookmark-start text:name="key-simpler-truth"/>🔑 Simpler Truth</text:h>
      <text:p text:style-name="Block_20_Text">Variables live as long as something still needs them</text:p>
      <text:p text:style-name="Standard">Closures = “something still needs them”</text:p>
      <text:p text:style-name="Standard"><text:bookmark-end text:name="Xfd3e7f3d6edd134f1bfdbecb8a079335e17b26b"/><text:bookmark-end text:name="key-simpler-truth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X3de50b825c2eff733d6b6a7ac87a9c9f98ab312"/><text:soft-page-break/>🧪 PART 3 — The Moment a Closure is CREATED</text:h>
      <text:p text:style-name="Standard">This is where most learners miss the key insight:</text:p>
      <text:p text:style-name="Text_20_body">👉 Closures are created <text:span text:style-name="T1">when the function is defined</text:span>, NOT when called</text:p>
      <text:h text:style-name="Heading_20_2" text:outline-level="2"><text:bookmark-start text:name="example"/>Example</text:h>
      <text:p text:style-name="Source_20_Code"><text:span text:style-name="KeywordTok">function</text:span><text:span text:style-name="NormalTok"> </text:span><text:span text:style-name="FunctionTok">outer</text:span><text:span text:style-name="NormalTok">() {</text:span><text:line-break/><text:span text:style-name="NormalTok"> <text:s/></text:span><text:span text:style-name="KeywordTok">let</text:span><text:span text:style-name="NormalTok"> x </text:span><text:span text:style-name="OperatorTok">=</text:span><text:span text:style-name="NormalTok"> </text:span><text:span text:style-name="DecValTok">10</text:span><text:span text:style-name="OperatorTok">;</text:span><text:line-break/><text:line-break/><text:span text:style-name="NormalTok"> <text:s/></text:span><text:span text:style-name="KeywordTok">function</text:span><text:span text:style-name="NormalTok"> </text:span><text:span text:style-name="FunctionTok">inner</text:span><text:span text:style-name="NormalTok">() {</text:span><text:line-break/><text:span text:style-name="NormalTok"> <text:s text:c="3"/></text:span><text:span text:style-name="BuiltInTok">console</text:span><text:span text:style-name="OperatorTok">.</text:span><text:span text:style-name="FunctionTok">log</text:span><text:span text:style-name="NormalTok">(x)</text:span><text:span text:style-name="OperatorTok">;</text:span><text:line-break/><text:span text:style-name="NormalTok"> <text:s/>}</text:span><text:line-break/><text:line-break/><text:span text:style-name="NormalTok"> <text:s/></text:span><text:span text:style-name="ControlFlowTok">return</text:span><text:span text:style-name="NormalTok"> inner</text:span><text:span text:style-name="OperatorTok">;</text:span><text:line-break/><text:span text:style-name="NormalTok">}</text:span><text:bookmark-end text:name="example"/></text:p>
      <text:h text:style-name="Heading_20_2" text:outline-level="2"><text:bookmark-start text:name="fire-important-moment"/>🔥 Important Moment</text:h>
      <text:p text:style-name="Standard">When this line runs:</text:p>
      <text:p text:style-name="Source_20_Code"><text:span text:style-name="KeywordTok">function</text:span><text:span text:style-name="NormalTok"> </text:span><text:span text:style-name="FunctionTok">inner</text:span><text:span text:style-name="NormalTok">() { </text:span><text:span text:style-name="OperatorTok">...</text:span><text:span text:style-name="NormalTok"> }</text:span></text:p>
      <text:p text:style-name="Standard">👉 JS creates:</text:p>
      <text:p text:style-name="Source_20_Code">inner function<text:line-break/>+<text:line-break/>🎒 closure with x = 10</text:p>
      <text:p text:style-name="Standard">NOT when you call inner() later.<text:bookmark-end text:name="X3de50b825c2eff733d6b6a7ac87a9c9f98ab312"/><text:bookmark-end text:name="fire-important-moment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X8fd57af84b1622bcd75a0ecd4b9fa36032a6421"/><text:soft-page-break/>🧪 PART 4 — The Counter (Now Explained PERFECTLY)</text:h>
      <text:p text:style-name="Source_20_Code"><text:span text:style-name="KeywordTok">function</text:span><text:span text:style-name="NormalTok"> </text:span><text:span text:style-name="FunctionTok">createCounter</text:span><text:span text:style-name="NormalTok">() {</text:span><text:line-break/><text:span text:style-name="NormalTok"> <text:s/></text:span><text:span text:style-name="KeywordTok">let</text:span><text:span text:style-name="NormalTok"> count </text:span><text:span text:style-name="OperatorTok">=</text:span><text:span text:style-name="NormalTok"> </text:span><text:span text:style-name="DecValTok">0</text:span><text:span text:style-name="OperatorTok">;</text:span><text:line-break/><text:line-break/><text:span text:style-name="NormalTok"> <text:s/></text:span><text:span text:style-name="ControlFlowTok">return</text:span><text:span text:style-name="NormalTok"> </text:span><text:span text:style-name="KeywordTok">function</text:span><text:span text:style-name="NormalTok"> () {</text:span><text:line-break/><text:span text:style-name="NormalTok"> <text:s text:c="3"/>count</text:span><text:span text:style-name="OperatorTok">++;</text:span><text:line-break/><text:span text:style-name="NormalTok"> <text:s text:c="3"/></text:span><text:span text:style-name="ControlFlowTok">return</text:span><text:span text:style-name="NormalTok"> count</text:span><text:span text:style-name="OperatorTok">;</text:span><text:line-break/><text:span text:style-name="NormalTok"> <text:s/>}</text:span><text:span text:style-name="OperatorTok">;</text:span><text:line-break/><text:span text:style-name="NormalTok">}</text:span></text:p>
      <text:h text:style-name="Heading_20_2" text:outline-level="2"><text:bookmark-start text:name="step-by-step-very-clear"/>Step-by-step (VERY CLEAR)</text:h>
      <text:h text:style-name="Heading_20_3" text:outline-level="3"><text:bookmark-start text:name="step-1--createcounter-runs"/>Step 1 — createCounter runs</text:h>
      <text:p text:style-name="Source_20_Code">count = 0<text:bookmark-end text:name="step-1--createcounter-runs"/></text:p>
      <text:h text:style-name="Heading_20_3" text:outline-level="3"><text:bookmark-start text:name="step-2--inner-function-created"/>Step 2 — inner function created</text:h>
      <text:p text:style-name="Source_20_Code">inner function + 🎒 { count: 0 }<text:bookmark-end text:name="step-2--inner-function-created"/></text:p>
      <text:h text:style-name="Heading_20_3" text:outline-level="3"><text:bookmark-start text:name="step-3--createcounter-ends"/>Step 3 — createCounter ends</text:h>
      <text:p text:style-name="Source_20_Code">Normally:<text:line-break/>count ❌ gone<text:line-break/><text:line-break/>BUT:<text:line-break/>count ✅ stays in backpack<text:bookmark-end text:name="step-3--createcounter-ends"/></text:p>
      <text:h text:style-name="Heading_20_3" text:outline-level="3"><text:bookmark-start text:name="step-4--call-counter"/>Step 4 — call counter()</text:h>
      <text:p text:style-name="Source_20_Code"><text:span text:style-name="FunctionTok">counter</text:span><text:span text:style-name="NormalTok">()</text:span><text:span text:style-name="OperatorTok">;</text:span></text:p>
      <text:p text:style-name="Standard">👉 Looks inside backpack:</text:p>
      <text:p text:style-name="Source_20_Code">count = 0 → 1<text:bookmark-end text:name="step-4--call-counter"/></text:p>
      <text:h text:style-name="Heading_20_3" text:outline-level="3"><text:bookmark-start text:name="step-5--call-again"/>Step 5 — call again</text:h>
      <text:p text:style-name="Source_20_Code">count = 1 → 2</text:p>
      <text:p text:style-name="Standard">👉 Same memory reused<text:bookmark-end text:name="step-5--call-again"/><text:bookmark-end text:name="step-by-step-very-clear"/><text:bookmark-end text:name="X8fd57af84b1622bcd75a0ecd4b9fa36032a6421"/></text:p>
      <text:h text:style-name="Heading_20_1" text:outline-level="1"><text:bookmark-start text:name="Xcccf9958a4b4fb3320b464f11d05c1952efb5a8"/><text:soft-page-break/>🔁 PART 5 — Why Two Counters Don’t Interfere</text:h>
      <text:p text:style-name="Source_20_Code"><text:span text:style-name="KeywordTok">const</text:span><text:span text:style-name="NormalTok"> c1 </text:span><text:span text:style-name="OperatorTok">=</text:span><text:span text:style-name="NormalTok"> </text:span><text:span text:style-name="FunctionTok">createCounter</text:span><text:span text:style-name="NormalTok">()</text:span><text:span text:style-name="OperatorTok">;</text:span><text:line-break/><text:span text:style-name="KeywordTok">const</text:span><text:span text:style-name="NormalTok"> c2 </text:span><text:span text:style-name="OperatorTok">=</text:span><text:span text:style-name="NormalTok"> </text:span><text:span text:style-name="FunctionTok">createCounter</text:span><text:span text:style-name="NormalTok">()</text:span><text:span text:style-name="OperatorTok">;</text:span></text:p>
      <text:h text:style-name="Heading_20_2" text:outline-level="2"><text:bookmark-start text:name="what-you-think"/>What you THINK:</text:h>
      <text:p text:style-name="Source_20_Code">One count shared ❌<text:bookmark-end text:name="what-you-think"/></text:p>
      <text:h text:style-name="Heading_20_2" text:outline-level="2"><text:bookmark-start text:name="what-actually-happens"/>What actually happens:</text:h>
      <text:p text:style-name="Source_20_Code">c1 → 🎒 { count: 0 }<text:line-break/>c2 → 🎒 { count: 0 }</text:p>
      <text:p text:style-name="Standard">👉 Two completely separate backpacks</text:p>
      <text:p text:style-name="Standard"><text:bookmark-end text:name="Xcccf9958a4b4fb3320b464f11d05c1952efb5a8"/><text:bookmark-end text:name="what-actually-happens"/></text:p>
      <text:h text:style-name="Heading_20_1" text:outline-level="1"><text:bookmark-start text:name="Xbcff78fe78408e83630a89dd55828c17997033b"/>⚠️ PART 6 — The Loop Trap (Now Explained Intuitively)</text:h>
      <text:p text:style-name="Source_20_Code"><text:span text:style-name="ControlFlowTok">for</text:span><text:span text:style-name="NormalTok"> (</text:span><text:span text:style-name="KeywordTok">var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</text:span><text:span text:style-name="DecValTok">3</text:span><text:span text:style-name="OperatorTok">;</text:span><text:span text:style-name="NormalTok"> i</text:span><text:span text:style-name="OperatorTok">++</text:span><text:span text:style-name="NormalTok">) {</text:span><text:line-break/><text:span text:style-name="NormalTok"> <text:s/></text:span><text:span text:style-name="PreprocessorTok">setTimeout</text:span><text:span text:style-name="NormalTok">(() </text:span><text:span text:style-name="KeywordTok">=&gt;</text:span><text:span text:style-name="NormalTok"> </text:span><text:span text:style-name="BuiltInTok">console</text:span><text:span text:style-name="OperatorTok">.</text:span><text:span text:style-name="FunctionTok">log</text:span><text:span text:style-name="NormalTok">(i)</text:span><text:span text:style-name="OperatorTok">,</text:span><text:span text:style-name="NormalTok"> </text:span><text:span text:style-name="DecValTok">100</text:span><text:span text:style-name="NormalTok">)</text:span><text:span text:style-name="OperatorTok">;</text:span><text:line-break/><text:span text:style-name="NormalTok">}</text:span></text:p>
      <text:h text:style-name="Heading_20_2" text:outline-level="2"><text:bookmark-start text:name="why-does-it-print-333"/>Why does it print 3,3,3?</text:h>
      <text:p text:style-name="Standard">👉 All functions share ONE backpack:</text:p>
      <text:p text:style-name="Source_20_Code">🎒 { i = 3 }<text:bookmark-end text:name="why-does-it-print-333"/></text:p>
      <text:h text:style-name="Heading_20_2" text:outline-level="2"><text:bookmark-start text:name="fix-with-let"/>Fix with let</text:h>
      <text:p text:style-name="Source_20_Code"><text:span text:style-name="ControlFlowTok">for</text:span><text:span text:style-name="NormalTok"> (</text:span><text:span text:style-name="KeywordTok">le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</text:span><text:span text:style-name="DecValTok">3</text:span><text:span text:style-name="OperatorTok">;</text:span><text:span text:style-name="NormalTok"> i</text:span><text:span text:style-name="OperatorTok">++</text:span><text:span text:style-name="NormalTok">) {</text:span><text:line-break/><text:span text:style-name="NormalTok"> <text:s/></text:span><text:span text:style-name="PreprocessorTok">setTimeout</text:span><text:span text:style-name="NormalTok">(() </text:span><text:span text:style-name="KeywordTok">=&gt;</text:span><text:span text:style-name="NormalTok"> </text:span><text:span text:style-name="BuiltInTok">console</text:span><text:span text:style-name="OperatorTok">.</text:span><text:span text:style-name="FunctionTok">log</text:span><text:span text:style-name="NormalTok">(i)</text:span><text:span text:style-name="OperatorTok">,</text:span><text:span text:style-name="NormalTok"> </text:span><text:span text:style-name="DecValTok">100</text:span><text:span text:style-name="NormalTok">)</text:span><text:span text:style-name="OperatorTok">;</text:span><text:line-break/><text:span text:style-name="NormalTok">}</text:span></text:p>
      <text:p text:style-name="Standard">👉 Each loop creates a new backpack:</text:p>
      <text:p text:style-name="Source_20_Code">🎒 { i = 0 }<text:line-break/>🎒 { i = 1 }<text:line-break/>🎒 { i = 2 }</text:p>
      <text:p text:style-name="Standard"><text:bookmark-end text:name="Xbcff78fe78408e83630a89dd55828c17997033b"/><text:bookmark-end text:name="fix-with-let"/></text:p>
      <text:h text:style-name="Heading_20_1" text:outline-level="1"><text:bookmark-start text:name="X3e3f4319ce4a643c139380cb3bff6cc795efbdc"/><text:soft-page-break/>⚛️ PART 7 — React: The REAL Problem (Stale Closures)</text:h>
      <text:p text:style-name="Standard">Now this is where your understanding becomes <text:span text:style-name="T1">valuable</text:span>.</text:p>
      <text:h text:style-name="Heading_20_2" text:outline-level="2"><text:bookmark-start text:name="react-key-idea"/>React Key Idea</text:h>
      <text:p text:style-name="Block_20_Text">Every render = a snapshot<text:bookmark-end text:name="react-key-idea"/></text:p>
      <text:h text:style-name="Heading_20_2" text:outline-level="2"><text:bookmark-start text:name="example-1"/>Example</text:h>
      <text:p text:style-name="Source_20_Code"><text:span text:style-name="KeywordTok">function</text:span><text:span text:style-name="NormalTok"> </text:span><text:span text:style-name="FunctionTok">Timer</text:span><text:span text:style-name="NormalTok">() {</text:span><text:line-break/><text:span text:style-name="NormalTok"> <text:s/></text:span><text:span text:style-name="KeywordTok">const</text:span><text:span text:style-name="NormalTok"> [seconds</text:span><text:span text:style-name="OperatorTok">,</text:span><text:span text:style-name="NormalTok"> setSeconds] </text:span><text:span text:style-name="OperatorTok">=</text:span><text:span text:style-name="NormalTok"> </text:span><text:span text:style-name="FunctionTok">useState</text:span><text:span text:style-name="NormalTok">(</text:span><text:span text:style-name="DecValTok">0</text:span><text:span text:style-name="NormalTok">)</text:span><text:span text:style-name="OperatorTok">;</text:span><text:line-break/><text:line-break/><text:span text:style-name="NormalTok"> <text:s/></text:span><text:span text:style-name="KeywordTok">const</text:span><text:span text:style-name="NormalTok"> start </text:span><text:span text:style-name="OperatorTok">=</text:span><text:span text:style-name="NormalTok"> () </text:span><text:span text:style-name="KeywordTok">=&gt;</text:span><text:span text:style-name="NormalTok"> {</text:span><text:line-break/><text:span text:style-name="NormalTok"> <text:s text:c="3"/></text:span><text:span text:style-name="PreprocessorTok">setTimeout</text:span><text:span text:style-name="NormalTok">(() </text:span><text:span text:style-name="KeywordTok">=&gt;</text:span><text:span text:style-name="NormalTok"> {</text:span><text:line-break/><text:span text:style-name="NormalTok"> <text:s text:c="5"/></text:span><text:span text:style-name="BuiltInTok">console</text:span><text:span text:style-name="OperatorTok">.</text:span><text:span text:style-name="FunctionTok">log</text:span><text:span text:style-name="NormalTok">(seconds)</text:span><text:span text:style-name="OperatorTok">;</text:span><text:line-break/><text:span text:style-name="NormalTok"> <text:s text:c="3"/>}</text:span><text:span text:style-name="OperatorTok">,</text:span><text:span text:style-name="NormalTok"> </text:span><text:span text:style-name="DecValTok">5000</text:span><text:span text:style-name="NormalTok">)</text:span><text:span text:style-name="OperatorTok">;</text:span><text:line-break/><text:span text:style-name="NormalTok"> <text:s/>}</text:span><text:span text:style-name="OperatorTok">;</text:span><text:line-break/><text:span text:style-name="NormalTok">}</text:span><text:bookmark-end text:name="example-1"/></text:p>
      <text:h text:style-name="Heading_20_2" text:outline-level="2"><text:bookmark-start text:name="what-happens"/>What happens?</text:h>
      <text:h text:style-name="Heading_20_3" text:outline-level="3"><text:bookmark-start text:name="render-1"/>Render 1:</text:h>
      <text:p text:style-name="Source_20_Code">seconds = 0</text:p>
      <text:p text:style-name="Standard">User clicks → closure created:</text:p>
      <text:p text:style-name="Source_20_Code">🎒 { seconds: 0 }<text:bookmark-end text:name="render-1"/></text:p>
      <text:h text:style-name="Heading_20_3" text:outline-level="3"><text:bookmark-start text:name="after-5-seconds"/>After 5 seconds</text:h>
      <text:p text:style-name="Standard">Even if:</text:p>
      <text:p text:style-name="Source_20_Code">seconds = 5</text:p>
      <text:p text:style-name="Standard">👉 The timeout still uses:</text:p>
      <text:p text:style-name="Source_20_Code">🎒 { seconds: 0 }<text:bookmark-end text:name="X3e3f4319ce4a643c139380cb3bff6cc795efbdc"/><text:bookmark-end text:name="what-happens"/><text:bookmark-end text:name="after-5-seconds"/></text:p>
      <text:p text:style-name="P2"/>
      <text:h text:style-name="Heading_20_1" text:outline-level="1"><text:bookmark-start text:name="rotating_light-that-is-a-stale-closure"/>🚨 That is a STALE CLOSURE</text:h>
      <text:p text:style-name="Block_20_Text">A closure holding onto an <text:span text:style-name="T1">old snapshot</text:span></text:p>
      <text:p text:style-name="Standard"><text:bookmark-end text:name="rotating_light-that-is-a-stale-closure"/></text:p>
      <text:h text:style-name="Heading_20_1" text:outline-level="1"><text:bookmark-start text:name="wrench-part-8--fixes-now-they-make-sense"/><text:soft-page-break/>🔧 PART 8 — Fixes (Now They Make Sense)</text:h>
      <text:h text:style-name="Heading_20_2" text:outline-level="2"><text:bookmark-start text:name="X42fe542f896eaa27bfc2062ecfa160b9db4fb49"/>✅ Fix 1 — Functional Update</text:h>
      <text:p text:style-name="Source_20_Code"><text:span text:style-name="FunctionTok">setCount</text:span><text:span text:style-name="NormalTok">(c </text:span><text:span text:style-name="KeywordTok">=&gt;</text:span><text:span text:style-name="NormalTok"> c </text:span><text:span text:style-name="OperatorTok">+</text:span><text:span text:style-name="NormalTok"> </text:span><text:span text:style-name="DecValTok">1</text:span><text:span text:style-name="NormalTok">)</text:span><text:span text:style-name="OperatorTok">;</text:span><text:bookmark-end text:name="X42fe542f896eaa27bfc2062ecfa160b9db4fb49"/></text:p>
      <text:h text:style-name="Heading_20_2" text:outline-level="2"><text:bookmark-start text:name="why-this-works"/>Why this works</text:h>
      <text:p text:style-name="Standard">👉 You are NOT using the backpack</text:p>
      <text:p text:style-name="Text_20_body">👉 React gives you the <text:span text:style-name="T1">latest value</text:span><text:bookmark-end text:name="why-this-works"/></text:p>
      <text:h text:style-name="Heading_20_2" text:outline-level="2"><text:bookmark-start text:name="white_check_mark-fix-2--useref"/>✅ Fix 2 — useRef</text:h>
      <text:p text:style-name="Source_20_Code"><text:span text:style-name="KeywordTok">const</text:span><text:span text:style-name="NormalTok"> ref </text:span><text:span text:style-name="OperatorTok">=</text:span><text:span text:style-name="NormalTok"> </text:span><text:span text:style-name="FunctionTok">useRef</text:span><text:span text:style-name="NormalTok">()</text:span><text:span text:style-name="OperatorTok">;</text:span><text:line-break/><text:line-break/><text:span text:style-name="NormalTok">ref</text:span><text:span text:style-name="OperatorTok">.</text:span><text:span text:style-name="AttributeTok">current</text:span><text:span text:style-name="NormalTok"> </text:span><text:span text:style-name="OperatorTok">=</text:span><text:span text:style-name="NormalTok"> seconds</text:span><text:span text:style-name="OperatorTok">;</text:span><text:line-break/><text:line-break/><text:span text:style-name="PreprocessorTok">setTimeout</text:span><text:span text:style-name="NormalTok">(() </text:span><text:span text:style-name="KeywordTok">=&gt;</text:span><text:span text:style-name="NormalTok"> {</text:span><text:line-break/><text:span text:style-name="NormalTok"> <text:s/></text:span><text:span text:style-name="BuiltInTok">console</text:span><text:span text:style-name="OperatorTok">.</text:span><text:span text:style-name="FunctionTok">log</text:span><text:span text:style-name="NormalTok">(ref</text:span><text:span text:style-name="OperatorTok">.</text:span><text:span text:style-name="AttributeTok">current</text:span><text:span text:style-name="NormalTok">)</text:span><text:span text:style-name="OperatorTok">;</text:span><text:line-break/><text:span text:style-name="NormalTok">}</text:span><text:span text:style-name="OperatorTok">,</text:span><text:span text:style-name="NormalTok"> </text:span><text:span text:style-name="DecValTok">5000</text:span><text:span text:style-name="NormalTok">)</text:span><text:span text:style-name="OperatorTok">;</text:span><text:bookmark-end text:name="white_check_mark-fix-2--useref"/></text:p>
      <text:h text:style-name="Heading_20_2" text:outline-level="2"><text:bookmark-start text:name="why-this-works-1"/>Why this works</text:h>
      <text:p text:style-name="Standard">👉 ref.current is like:</text:p>
      <text:p text:style-name="Source_20_Code">A shared box outside all backpacks<text:bookmark-end text:name="why-this-works-1"/></text:p>
      <text:h text:style-name="Heading_20_2" text:outline-level="2"><text:bookmark-start text:name="white_check_mark-fix-3--recreate-closure"/>✅ Fix 3 — Recreate Closure</text:h>
      <text:p text:style-name="Standard">Use dependencies so React rebuilds the function with fresh values</text:p>
      <text:p text:style-name="Standard"><text:bookmark-end text:name="wrench-part-8--fixes-now-they-make-sense"/><text:bookmark-end text:name="white_check_mark-fix-3--recreate-closure"/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dart-part-9--the-3-mental-models-final"/><text:soft-page-break/>🎯 PART 9 — The 3 Mental Models (Final)</text:h>
      <text:h text:style-name="Heading_20_2" text:outline-level="2"><text:bookmark-start text:name="Xbf38e3af853ffe5f17b8626259f25360c83f684"/>1. Backpack Model 🎒</text:h>
      <text:p text:style-name="Standard">Closure = function + remembered variables<text:bookmark-end text:name="Xbf38e3af853ffe5f17b8626259f25360c83f684"/></text:p>
      <text:h text:style-name="Heading_20_2" text:outline-level="2"><text:bookmark-start text:name="Xd5958dd064ed38db71ab58f044f63276eef158b"/>2. Survival Rule</text:h>
      <text:p text:style-name="Source_20_Code">If a function still needs a variable → it survives<text:bookmark-end text:name="Xd5958dd064ed38db71ab58f044f63276eef158b"/></text:p>
      <text:h text:style-name="Heading_20_2" text:outline-level="2"><text:bookmark-start text:name="X8640297c327705d0ea2003197a4f55e1208219b"/>3. React Snapshot Rule</text:h>
      <text:p text:style-name="Source_20_Code">Each render = new world<text:line-break/>Closures capture ONE world</text:p>
      <text:p text:style-name="Standard"><text:bookmark-end text:name="dart-part-9--the-3-mental-models-final"/><text:bookmark-end text:name="X8640297c327705d0ea2003197a4f55e1208219b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test_tube-part-10--final-click-exercise"/><text:soft-page-break/>🧪 PART 10 — Final “Click” Exercise</text:h>
      <text:p text:style-name="Standard">Predict this:</text:p>
      <text:p text:style-name="Source_20_Code"><text:span text:style-name="KeywordTok">function</text:span><text:span text:style-name="NormalTok"> </text:span><text:span text:style-name="FunctionTok">test</text:span><text:span text:style-name="NormalTok">() {</text:span><text:line-break/><text:span text:style-name="NormalTok"> <text:s/></text:span><text:span text:style-name="KeywordTok">let</text:span><text:span text:style-name="NormalTok"> x </text:span><text:span text:style-name="OperatorTok">=</text:span><text:span text:style-name="NormalTok"> </text:span><text:span text:style-name="DecValTok">0</text:span><text:span text:style-name="OperatorTok">;</text:span><text:line-break/><text:line-break/><text:span text:style-name="NormalTok"> <text:s/></text:span><text:span text:style-name="ControlFlowTok">return</text:span><text:span text:style-name="NormalTok"> </text:span><text:span text:style-name="KeywordTok">function</text:span><text:span text:style-name="NormalTok"> () {</text:span><text:line-break/><text:span text:style-name="NormalTok"> <text:s text:c="3"/>x </text:span><text:span text:style-name="OperatorTok">+=</text:span><text:span text:style-name="NormalTok"> </text:span><text:span text:style-name="DecValTok">5</text:span><text:span text:style-name="OperatorTok">;</text:span><text:line-break/><text:span text:style-name="NormalTok"> <text:s text:c="3"/></text:span><text:span text:style-name="ControlFlowTok">return</text:span><text:span text:style-name="NormalTok"> x</text:span><text:span text:style-name="OperatorTok">;</text:span><text:line-break/><text:span text:style-name="NormalTok"> <text:s/>}</text:span><text:span text:style-name="OperatorTok">;</text:span><text:line-break/><text:span text:style-name="NormalTok">}</text:span><text:line-break/><text:line-break/><text:span text:style-name="KeywordTok">const</text:span><text:span text:style-name="NormalTok"> t1 </text:span><text:span text:style-name="OperatorTok">=</text:span><text:span text:style-name="NormalTok"> </text:span><text:span text:style-name="FunctionTok">test</text:span><text:span text:style-name="NormalTok">()</text:span><text:span text:style-name="OperatorTok">;</text:span><text:line-break/><text:span text:style-name="KeywordTok">const</text:span><text:span text:style-name="NormalTok"> t2 </text:span><text:span text:style-name="OperatorTok">=</text:span><text:span text:style-name="NormalTok"> </text:span><text:span text:style-name="FunctionTok">test</text:span><text:span text:style-name="NormalTok">()</text:span><text:span text:style-name="OperatorTok">;</text:span><text:line-break/><text:line-break/><text:span text:style-name="BuiltInTok">console</text:span><text:span text:style-name="OperatorTok">.</text:span><text:span text:style-name="FunctionTok">log</text:span><text:span text:style-name="NormalTok">(</text:span><text:span text:style-name="FunctionTok">t1</text:span><text:span text:style-name="NormalTok">())</text:span><text:span text:style-name="OperatorTok">;</text:span><text:line-break/><text:span text:style-name="BuiltInTok">console</text:span><text:span text:style-name="OperatorTok">.</text:span><text:span text:style-name="FunctionTok">log</text:span><text:span text:style-name="NormalTok">(</text:span><text:span text:style-name="FunctionTok">t1</text:span><text:span text:style-name="NormalTok">())</text:span><text:span text:style-name="OperatorTok">;</text:span><text:line-break/><text:span text:style-name="BuiltInTok">console</text:span><text:span text:style-name="OperatorTok">.</text:span><text:span text:style-name="FunctionTok">log</text:span><text:span text:style-name="NormalTok">(</text:span><text:span text:style-name="FunctionTok">t2</text:span><text:span text:style-name="NormalTok">())</text:span><text:span text:style-name="OperatorTok">;</text:span></text:p>
      <text:h text:style-name="Heading_20_2" text:outline-level="2"><text:bookmark-start text:name="white_check_mark-answer"/>✅ Answer</text:h>
      <text:p text:style-name="Source_20_Code">5<text:line-break/>10<text:line-break/>5<text:bookmark-end text:name="white_check_mark-answer"/></text:p>
      <text:h text:style-name="Heading_20_2" text:outline-level="2"><text:bookmark-start text:name="why"/>Why?</text:h>
      <text:p text:style-name="Source_20_Code">t1 → 🎒 { x = 0 → 5 → 10 }<text:line-break/>t2 → 🎒 { x = 0 → 5 }</text:p>
      <text:p text:style-name="Standard"><text:bookmark-end text:name="test_tube-part-10--final-click-exercise"/><text:bookmark-end text:name="why"/></text:p>
      <text:h text:style-name="Heading_20_1" text:outline-level="1"><text:bookmark-start text:name="fire-final-simplified-truth"/>🔥 FINAL SIMPLIFIED TRUTH</text:h>
      <text:p text:style-name="Standard">If everything above feels like a lot, keep ONLY this:</text:p>
      <text:p text:style-name="Block_20_Text">A closure is when a function <text:span text:style-name="T1">remembers data after its parent function is gone</text:span><text:bookmark-end text:name="fire-final-simplified-truth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595959" loext:opacity="100%" style:font-name="Aptos" fo:font-size="11pt" fo:language="en" fo:country="US" style:letter-kerning="false" style:font-name-asian="Aptos1" style:font-size-asian="11pt" style:language-asian="en" style:country-asian="US" style:font-name-complex="F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fo:color="#595959" loext:opacity="100%" style:font-name="Aptos" fo:font-size="11pt" fo:language="en" fo:country="US" style:letter-kerning="fals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3490"/>
        </loext:char-complex-color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top="0in" fo:margin-bottom="0.111in" style:contextual-spacing="true" fo:text-indent="-0.1965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21272f" loext:opacity="100%" fo:font-style="italic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.0138in" style:contextual-spacing="true" fo:keep-together="always" fo:keep-with-next="always"/>
      <style:text-properties fo:color="#1d665d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917in" fo:margin-bottom="0.0138in" style:contextual-spacing="true" fo:keep-together="always" fo:keep-with-next="always"/>
      <style:text-properties fo:color="#262626" loext:opacity="100%" style:font-name="Aptos Display" fo:font-family="'Aptos Display'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 style:font-size-complex="13pt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917in" fo:margin-bottom="0.0138in" style:contextual-spacing="true" fo:keep-together="always" fo:keep-with-next="always"/>
      <style:text-properties fo:color="#1d665d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2917in" fo:margin-bottom="0.0138in" style:contextual-spacing="true" fo:keep-together="always" fo:keep-with-next="always"/>
      <style:text-properties fo:color="#0d0d0d" loext:opacity="100%" style:font-name="Aptos Display" fo:font-family="'Aptos Display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2917in" fo:margin-bottom="0.0138in" style:contextual-spacing="true" fo:keep-together="always" fo:keep-with-next="always"/>
      <style:text-properties fo:color="#1d665d" loext:opacity="100%" style:font-name="Aptos Display" fo:font-family="'Aptos Display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2917in" fo:margin-bottom="0.0138in" style:contextual-spacing="true" fo:keep-together="always" fo:keep-with-next="always"/>
      <style:text-properties fo:color="#0d0d0d" loext:opacity="100%" style:font-name="Aptos Display" fo:font-family="'Aptos Display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>
        <loext:char-complex-color loext:theme-type="dark1" loext:color-type="theme">
          <loext:transformation loext:type="tint" loext:value="50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2917in" fo:margin-bottom="0.0138in" style:contextual-spacing="true" fo:keep-together="always" fo:keep-with-next="always"/>
      <style:text-properties fo:color="#000000" loext:opacity="100%" style:font-name="Aptos Display" fo:font-family="'Aptos Display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2917in" fo:margin-bottom="0.0138in" style:contextual-spacing="true" fo:keep-together="always" fo:keep-with-next="always"/>
      <style:text-properties fo:color="#1d665d" loext:opacity="100%" style:font-name="Aptos Display" fo:font-family="'Aptos Display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0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2917in" fo:margin-bottom="0.0138in" style:contextual-spacing="true" fo:keep-together="always" fo:keep-with-next="always"/>
      <style:text-properties fo:color="#000000" loext:opacity="100%" style:font-name="Aptos Display" fo:font-family="'Aptos Display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 style:font-style-complex="italic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/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/>
    </style:style>
    <style:style style:name="List_20_1" style:display-name="List 1" style:family="paragraph" style:parent-style-name="Standard" style:list-style-name="WWNum7" style:class="list">
      <style:paragraph-properties fo:margin-left="0.6in" fo:margin-top="0in" fo:margin-bottom="0.111in" style:contextual-spacing="true" fo:text-indent="-0.2in" style:auto-text-indent="false"/>
    </style:style>
    <style:style style:name="Title" style:family="paragraph" style:parent-style-name="Standard" loext:linked-style-name="Title_20_Char" style:class="chapter">
      <style:paragraph-properties fo:margin-top="0.0835in" fo:margin-bottom="0.0835in" style:contextual-spacing="true" fo:line-height="100%"/>
      <style:text-properties fo:color="#ffffff" loext:opacity="100%" style:font-name="Aptos Display" fo:font-family="'Aptos Display'" style:font-family-generic="roman" style:font-pitch="variable" fo:font-size="26pt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8pt">
        <loext:char-complex-color loext:theme-type="light1" loext:color-type="theme"/>
      </style:text-properties>
    </style:style>
    <style:style style:name="Subtitle" style:family="paragraph" style:parent-style-name="Standard" loext:linked-style-name="Subtitle_20_Char" style:class="chapter">
      <style:paragraph-properties fo:margin-top="0.0835in" fo:margin-bottom="0.0835in" style:contextual-spacing="false"/>
      <style:text-properties fo:color="#1d665d" loext:opacity="100%" fo:font-size="12pt" style:font-name-asian="F" style:font-family-generic-asian="system" style:font-pitch-asian="variable" style:font-size-asian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Standard" style:next-style-name="Index_20_1" style:class="index">
      <style:text-properties style:font-name="Aptos Display" fo:font-family="'Aptos Display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font-size="16pt" style:font-size-asian="16pt"/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Block_20_Text" style:display-name="Block Text" style:family="paragraph" style:parent-style-name="Standard">
      <style:paragraph-properties fo:margin-top="0.0417in" fo:margin-bottom="0in" style:contextual-spacing="true" fo:line-height="104%"/>
      <style:text-properties fo:font-weight="bold" style:font-name-asian="F" style:font-family-generic-asian="system" style:font-pitch-asian="variable" style:font-weight-asian="bold" style:font-style-complex="italic"/>
    </style:style>
    <style:style style:name="Numbering_20_1" style:display-name="Numbering 1" style:family="paragraph" style:parent-style-name="Standard" style:list-style-name="WWNum6" style:class="list">
      <style:paragraph-properties fo:margin-left="0.6in" fo:margin-top="0in" fo:margin-bottom="0.111in" style:contextual-spacing="true" fo:text-indent="-0.2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/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.111in" style:contextual-spacing="false" fo:text-indent="0.25in" style:auto-text-indent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1965in" fo:margin-top="0in" fo:margin-bottom="0.0835in" style:contextual-spacing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left="0.25in" fo:margin-top="0in" fo:margin-bottom="0.111in" style:contextual-spacing="false" fo:text-indent="0.25in" style:auto-text-indent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1965in" fo:margin-top="0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1965in" fo:margin-top="0in" fo:margin-bottom="0.0835in" style:contextual-spacing="false"/>
      <style:text-properties style:font-size-complex="8pt"/>
    </style:style>
    <style:style style:name="Appendix" style:family="paragraph" style:parent-style-name="Standard" loext:linked-style-name="Closing_20_Char" style:class="chapter">
      <style:paragraph-properties fo:margin-left="2.9528in" fo:margin-top="0in" fo:margin-bottom="0in" style:contextual-spacing="false" fo:line-height="100%"/>
    </style:style>
    <style:style style:name="Marginalia" style:family="paragraph" style:parent-style-name="Standard" loext:linked-style-name="Comment_20_Text_20_Char" style:class="text">
      <style:paragraph-properties fo:line-height="100%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/>
    <style:style style:name="Document_20_Map" style:display-name="Document Map" style:family="paragraph" style:parent-style-name="Standard" loext:linked-style-name="Document_20_Map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margin-top="0in" fo:margin-bottom="0in" style:contextual-spacing="false" fo:line-height="100%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</style:style>
    <style:style style:name="Addressee" style:family="paragraph" style:parent-style-name="Standard" style:class="extra">
      <style:paragraph-properties fo:margin-left="2in" fo:margin-top="0in" fo:margin-bottom="0in" style:contextual-spacing="false" fo:line-height="100%"/>
      <style:text-properties style:font-name="Aptos Display" fo:font-family="'Aptos Display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ender" style:family="paragraph" style:parent-style-name="Standard" style:class="extra">
      <style:paragraph-properties fo:margin-top="0in" fo:margin-bottom="0in" style:contextual-spacing="false" fo:line-height="100%"/>
      <style:text-properties style:font-name="Aptos Display" fo:font-family="'Aptos Display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</style:style>
    <style:style style:name="HTML_20_Address" style:display-name="HTML Address" style:family="paragraph" style:parent-style-name="Standard" loext:linked-style-name="HTML_20_Address_20_Char">
      <style:paragraph-properties fo:margin-top="0in" fo:margin-bottom="0in" style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39in" fo:margin-top="0in" fo:margin-bottom="0in" style:contextual-spacing="false" fo:line-height="100%" fo:text-indent="-0.139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278in" fo:margin-top="0in" fo:margin-bottom="0in" style:contextual-spacing="false" fo:line-height="100%" fo:text-indent="-0.139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4165in" fo:margin-top="0in" fo:margin-bottom="0in" style:contextual-spacing="false" fo:line-height="100%" fo:text-indent="-0.139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5555in" fo:margin-top="0in" fo:margin-bottom="0in" style:contextual-spacing="false" fo:line-height="100%" fo:text-indent="-0.139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6945in" fo:margin-top="0in" fo:margin-bottom="0in" style:contextual-spacing="false" fo:line-height="100%" fo:text-indent="-0.139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0.8335in" fo:margin-top="0in" fo:margin-bottom="0in" style:contextual-spacing="false" fo:line-height="100%" fo:text-indent="-0.139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0.972in" fo:margin-top="0in" fo:margin-bottom="0in" style:contextual-spacing="false" fo:line-height="100%" fo:text-indent="-0.139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111in" fo:margin-top="0in" fo:margin-bottom="0in" style:contextual-spacing="false" fo:line-height="100%" fo:text-indent="-0.139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25in" fo:margin-top="0in" fo:margin-bottom="0in" style:contextual-spacing="false" fo:line-height="100%" fo:text-indent="-0.139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1d665d" fo:border-bottom="0.51pt solid #1d665d"/>
      <style:text-properties fo:color="#1d665d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3929in" fo:margin-top="0in" fo:margin-bottom="0.111in" style:contextual-spacing="true" fo:text-indent="-0.1965in" style:auto-text-indent="false"/>
    </style:style>
    <style:style style:name="List_20_3_20__28_WW_29_" style:display-name="List 3 (WW)" style:family="paragraph" style:parent-style-name="Standard">
      <style:paragraph-properties fo:margin-left="0.5898in" fo:margin-top="0in" fo:margin-bottom="0.111in" style:contextual-spacing="true" fo:text-indent="-0.1965in" style:auto-text-indent="false"/>
    </style:style>
    <style:style style:name="List_20_4_20__28_WW_29_" style:display-name="List 4 (WW)" style:family="paragraph" style:parent-style-name="Standard">
      <style:paragraph-properties fo:margin-left="0.7862in" fo:margin-top="0in" fo:margin-bottom="0.111in" style:contextual-spacing="true" fo:text-indent="-0.1965in" style:auto-text-indent="false"/>
    </style:style>
    <style:style style:name="List_20_5_20__28_WW_29_" style:display-name="List 5 (WW)" style:family="paragraph" style:parent-style-name="Standard">
      <style:paragraph-properties fo:margin-left="0.9827in" fo:margin-top="0in" fo:margin-bottom="0.111in" style:contextual-spacing="true" fo:text-indent="-0.1965in" style:auto-text-indent="false"/>
    </style:style>
    <style:style style:name="List_20_2" style:display-name="List 2" style:family="paragraph" style:parent-style-name="Standard" style:list-style-name="WWNum9" style:class="list">
      <style:paragraph-properties fo:margin-top="0in" fo:margin-bottom="0.111in" style:contextual-spacing="true"/>
    </style:style>
    <style:style style:name="List_20_3" style:display-name="List 3" style:family="paragraph" style:parent-style-name="Standard" style:list-style-name="WWNum10" style:class="list">
      <style:paragraph-properties fo:margin-top="0in" fo:margin-bottom="0.111in" style:contextual-spacing="true"/>
    </style:style>
    <style:style style:name="List_20_4" style:display-name="List 4" style:family="paragraph" style:parent-style-name="Standard" style:list-style-name="WWNum11" style:class="list">
      <style:paragraph-properties fo:margin-top="0in" fo:margin-bottom="0.111in" style:contextual-spacing="true"/>
    </style:style>
    <style:style style:name="List_20_5" style:display-name="List 5" style:family="paragraph" style:parent-style-name="Standard" style:list-style-name="WWNum12" style:class="list">
      <style:paragraph-properties fo:margin-top="0in" fo:margin-bottom="0.111in" style:contextual-spacing="true"/>
    </style:style>
    <style:style style:name="List_20_1_20_Cont." style:display-name="List 1 Cont." style:family="paragraph" style:parent-style-name="Standard" style:class="list">
      <style:paragraph-properties fo:margin-left="0.196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3929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5898in" fo:margin-top="0in" fo:margin-bottom="0.0835in" style:contextual-spacing="true"/>
    </style:style>
    <style:style style:name="List_20_4_20_Cont." style:display-name="List 4 Cont." style:family="paragraph" style:parent-style-name="Standard" style:class="list">
      <style:paragraph-properties fo:margin-left="0.7862in" fo:margin-top="0in" fo:margin-bottom="0.0835in" style:contextual-spacing="true"/>
    </style:style>
    <style:style style:name="List_20_5_20_Cont." style:display-name="List 5 Cont." style:family="paragraph" style:parent-style-name="Standard" style:class="list">
      <style:paragraph-properties fo:margin-left="0.9827in" fo:margin-top="0in" fo:margin-bottom="0.0835in" style:contextual-spacing="true"/>
    </style:style>
    <style:style style:name="Numbering_20_2" style:display-name="Numbering 2" style:family="paragraph" style:parent-style-name="Standard" style:list-style-name="WWNum13" style:class="list">
      <style:paragraph-properties fo:margin-top="0in" fo:margin-bottom="0.111in" style:contextual-spacing="true"/>
    </style:style>
    <style:style style:name="Numbering_20_3" style:display-name="Numbering 3" style:family="paragraph" style:parent-style-name="Standard" style:list-style-name="WWNum14" style:class="list">
      <style:paragraph-properties fo:margin-top="0in" fo:margin-bottom="0.111in" style:contextual-spacing="true"/>
    </style:style>
    <style:style style:name="Numbering_20_4" style:display-name="Numbering 4" style:family="paragraph" style:parent-style-name="Standard" style:list-style-name="WWNum15" style:class="list">
      <style:paragraph-properties fo:margin-top="0in" fo:margin-bottom="0.111in" style:contextual-spacing="true"/>
    </style:style>
    <style:style style:name="Numbering_20_5" style:display-name="Numbering 5" style:family="paragraph" style:parent-style-name="Standard" style:list-style-name="WWNum16" style:class="list">
      <style:paragraph-properties fo:margin-top="0in" fo:margin-bottom="0.111in" style:contextual-spacing="tru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macro" style:family="paragraph" loext:linked-style-name="Macro_20_Text_20_Char">
      <style:paragraph-properties fo:margin-top="0in" fo:margin-bottom="0in" style:contextual-spacing="false" fo:line-height="108%" fo:text-align="lef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874in" fo:margin-top="0in" fo:margin-bottom="0in" style:contextual-spacing="false" fo:line-height="100%" fo:text-indent="-0.7874in" style:auto-text-indent="false" fo:background-color="#cccccc" fo:padding="0.0138in" fo:border="0.74pt solid #000000" style:shadow="none"/>
      <style:text-properties style:font-name="Aptos Display" fo:font-family="'Aptos Display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0.5in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margin-top="0in" fo:margin-bottom="0in" style:contextual-spacing="false" fo:line-height="100%"/>
    </style:style>
    <style:style style:name="Plain_20_Text" style:display-name="Plain Text" style:family="paragraph" style:parent-style-name="Standard" loext:linked-style-name="Plain_20_Text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_20_Char" style:class="text"/>
    <style:style style:name="Signature" style:family="paragraph" style:parent-style-name="Standard" loext:linked-style-name="Signature_20_Char" style:class="text">
      <style:paragraph-properties fo:margin-left="2.9528in" fo:margin-top="0in" fo:margin-bottom="0in" style:contextual-spacing="false" fo:line-height="100%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528in" fo:margin-top="0in" fo:margin-bottom="0in" style:contextual-spacing="false" fo:text-indent="-0.1528in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111in" style:contextual-spacing="false"/>
      <style:text-properties style:font-name="Aptos Display" fo:font-family="'Aptos Display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top="0in" fo:margin-bottom="0.0693in" style:contextual-spacing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top="0in" fo:margin-bottom="0.0693in" style:contextual-spacing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top="0in" fo:margin-bottom="0.0693in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top="0in" fo:margin-bottom="0.0693in" style:contextual-spacing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top="0in" fo:margin-bottom="0.0693in" style:contextual-spacing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top="0in" fo:margin-bottom="0.0693in" style:contextual-spacing="false"/>
    </style:style>
    <style:style style:name="Source_20_Code" style:display-name="Source Code" style:family="paragraph" style:parent-style-name="Standard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font-size="11pt" style:font-size-asian="11pt"/>
    </style:style>
    <style:style style:name="Footer_20_Char" style:display-name="Footer Char" style:family="text" style:parent-style-name="Default_20_Paragraph_20_Font" loext:linked-style-name="Footer">
      <style:text-properties fo:font-size="11pt" style:font-size-asian="11pt"/>
    </style:style>
    <style:style style:name="Heading_20_1_20_Char" style:display-name="Heading 1 Char" style:family="text" style:parent-style-name="Default_20_Paragraph_20_Font" loext:linked-style-name="Heading_20_1">
      <style:text-properties fo:color="#1d665d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62626" loext:opacity="100%" style:font-name="Aptos Display" fo:font-family="'Aptos Display'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 style:font-size-complex="13pt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d665d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d0d0d" loext:opacity="100%" style:font-name="Aptos Display" fo:font-family="'Aptos Display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1d665d" loext:opacity="100%" style:font-name="Aptos Display" fo:font-family="'Aptos Display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0d0d0d" loext:opacity="100%" style:font-name="Aptos Display" fo:font-family="'Aptos Display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>
        <loext:char-complex-color loext:theme-type="dark1" loext:color-type="theme">
          <loext:transformation loext:type="tint" loext:value="50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000000" loext:opacity="100%" style:font-name="Aptos Display" fo:font-family="'Aptos Display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1d665d" loext:opacity="100%" style:font-name="Aptos Display" fo:font-family="'Aptos Display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0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000000" loext:opacity="100%" style:font-name="Aptos Display" fo:font-family="'Aptos Display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0.5pt" style:font-style-complex="italic">
        <loext:char-complex-color loext:theme-type="dark1" loext:color-type="theme"/>
      </style:text-properties>
    </style:style>
    <style:style style:name="Strong_20_Emphasis" style:display-name="Strong Emphasis" style:family="text" style:parent-style-name="Default_20_Paragraph_20_Font">
      <style:text-properties fo:color="#595959" loext:opacity="100%" fo:font-size="11pt" fo:font-weight="bold" style:font-size-asian="11pt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fo:color="#ffffff" loext:opacity="100%" style:font-name="Aptos Display" fo:font-family="'Aptos Display'" style:font-family-generic="roman" style:font-pitch="variable" fo:font-size="26pt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8pt">
        <loext:char-complex-color loext:theme-type="light1" loext:color-type="theme"/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1d665d" loext:opacity="100%" fo:font-size="12pt" style:font-name-asian="F" style:font-family-generic-asian="system" style:font-pitch-asian="variable" style:font-size-asian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fo:font-size="11pt" style:font-size-asian="11pt"/>
    </style:style>
    <style:style style:name="Body_20_Text_20_2_20_Char" style:display-name="Body Text 2 Char" style:family="text" style:parent-style-name="Default_20_Paragraph_20_Font" loext:linked-style-name="Body_20_Text_20_2">
      <style:text-properties fo:font-size="11pt" style:font-size-asian="11pt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1pt" style:font-size-asian="11pt" style:font-size-complex="8pt"/>
    </style:style>
    <style:style style:name="Body_20_Text_20_First_20_Indent_20_Char" style:display-name="Body Text First Indent Char" style:family="text" style:parent-style-name="Body_20_Text_20_Char">
      <style:text-properties fo:font-size="11pt" style:font-size-asian="11pt"/>
    </style:style>
    <style:style style:name="Body_20_Text_20_Indent_20_Char" style:display-name="Body Text Indent Char" style:family="text" style:parent-style-name="Default_20_Paragraph_20_Font">
      <style:text-properties fo:font-size="11pt" style:font-size-asian="11pt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fo:font-size="11pt" style:font-size-asian="11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1pt" style:font-size-asian="11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1pt" style:font-size-asian="11pt" style:font-size-complex="8pt"/>
    </style:style>
    <style:style style:name="Book_20_Title" style:display-name="Book Title" style:family="text" style:parent-style-name="Default_20_Paragraph_20_Font">
      <style:text-properties fo:font-size="11pt" fo:letter-spacing="0.0035in" fo:font-style="italic" fo:font-weight="bold" style:font-size-asian="11pt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 loext:linked-style-name="Appendix">
      <style:text-properties fo:font-size="11pt" style:font-size-asian="11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1pt" style:font-size-asian="11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1pt" fo:font-weight="bold" style:font-size-asian="11pt" style:font-weight-asian="bold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1pt" style:font-size-asian="11pt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swiss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fo:font-size="11pt" style:font-size-asian="11pt"/>
    </style:style>
    <style:style style:name="Emphasis" style:family="text" style:parent-style-name="Default_20_Paragraph_20_Font">
      <style:text-properties fo:font-size="11pt" fo:font-style="italic" style:font-size-asian="11pt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 fo:font-size="11pt" style:font-size-asian="11pt"/>
    </style:style>
    <style:style style:name="Endnote_20_anchor" style:display-name="Endnote anchor" style:family="text">
      <style:text-properties style:text-position="super 58%" fo:font-size="11pt" style:font-size-asian="11pt"/>
    </style:style>
    <style:style style:name="Endnote_20_Text_20_Char" style:display-name="Endnote Text Char" style:family="text" style:parent-style-name="Default_20_Paragraph_20_Font" loext:linked-style-name="Endnote">
      <style:text-properties fo:font-size="11pt" style:font-size-asian="11pt"/>
    </style:style>
    <style:style style:name="Visited_20_Internet_20_Link" style:display-name="Visited Internet Link" style:family="text" style:parent-style-name="Default_20_Paragraph_20_Font">
      <style:text-properties fo:color="#9e2a56" loext:opacity="100%" fo:font-size="11pt" style:text-underline-style="solid" style:text-underline-width="auto" style:text-underline-color="font-color" style:font-size-asian="11pt">
        <loext:char-complex-color loext:theme-type="followed-hyperlink" loext:color-type="theme"/>
      </style:text-properties>
    </style:style>
    <style:style style:name="Footnote_20_Symbol" style:display-name="Footnote Symbol" style:family="text" style:parent-style-name="Default_20_Paragraph_20_Font">
      <style:text-properties style:text-position="super 58%" fo:font-size="11pt" style:font-size-asian="11pt"/>
    </style:style>
    <style:style style:name="Footnote_20_anchor" style:display-name="Footnote anchor" style:family="text">
      <style:text-properties style:text-position="super 58%" fo:font-size="11pt" style:font-size-asian="11pt"/>
    </style:style>
    <style:style style:name="Footnote_20_Text_20_Char" style:display-name="Footnote Text Char" style:family="text" style:parent-style-name="Default_20_Paragraph_20_Font" loext:linked-style-name="Footnote">
      <style:text-properties fo:font-size="11pt" style:font-size-asian="11pt"/>
    </style:style>
    <style:style style:name="Hashtag" style:family="text" style:parent-style-name="Default_20_Paragraph_20_Font">
      <style:text-properties fo:color="#2b579a" loext:opacity="100%" fo:font-size="11pt" fo:background-color="#e6e6e6" style:font-size-asian="11pt"/>
    </style:style>
    <style:style style:name="HTML_20_Acronym" style:display-name="HTML Acronym" style:family="text" style:parent-style-name="Default_20_Paragraph_20_Font">
      <style:text-properties fo:font-size="11pt" style:font-size-asian="11pt"/>
    </style:style>
    <style:style style:name="HTML_20_Address_20_Char" style:display-name="HTML Address Char" style:family="text" style:parent-style-name="Default_20_Paragraph_20_Font" loext:linked-style-name="HTML_20_Address">
      <style:text-properties fo:font-size="11pt" fo:font-style="italic" style:font-size-asian="11pt" style:font-style-asian="italic" style:font-style-complex="italic"/>
    </style:style>
    <style:style style:name="HTML_20_Cite" style:display-name="HTML Cite" style:family="text" style:parent-style-name="Default_20_Paragraph_20_Font">
      <style:text-properties fo:font-size="11pt" fo:font-style="italic" style:font-size-asian="11pt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ize="11pt" fo:font-style="italic" style:font-size-asian="11pt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font-size-asian="11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ize="11pt" fo:font-style="italic" style:font-size-asian="11pt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1d665d" loext:opacity="100%" fo:font-size="11pt" style:text-underline-style="solid" style:text-underline-width="auto" style:text-underline-color="font-color" style:font-size-asian="11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1d665d" loext:opacity="100%" fo:font-size="11pt" fo:font-style="italic" style:font-size-asian="11pt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1d665d" loext:opacity="100%" fo:font-size="11pt" fo:font-style="italic" style:font-size-asian="11pt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1d665d" loext:opacity="100%" fo:font-size="11pt" fo:letter-spacing="0.0035in" fo:font-weight="bold" style:font-size-asian="11pt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ne_20_numbering" style:display-name="Line numbering" style:family="text" style:parent-style-name="Default_20_Paragraph_20_Font">
      <style:text-properties fo:font-size="11pt" style:font-size-asian="11pt"/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font-size-asian="11pt"/>
    </style:style>
    <style:style style:name="Mention" style:family="text" style:parent-style-name="Default_20_Paragraph_20_Font">
      <style:text-properties fo:color="#2b579a" loext:opacity="100%" fo:font-size="11pt" fo:background-color="#e6e6e6" style:font-size-asian="11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Aptos Display" fo:font-family="'Aptos Display'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 loext:linked-style-name="Note_20_Heading">
      <style:text-properties fo:font-size="11pt" style:font-size-asian="11pt"/>
    </style:style>
    <style:style style:name="Page_20_Number" style:display-name="Page Number" style:family="text" style:parent-style-name="Default_20_Paragraph_20_Font">
      <style:text-properties fo:font-size="11pt" style:font-size-asian="11pt"/>
    </style:style>
    <style:style style:name="Placeholder_20_Text" style:display-name="Placeholder Text" style:family="text" style:parent-style-name="Default_20_Paragraph_20_Font">
      <style:text-properties fo:color="#808080" loext:opacity="100%" fo:font-size="11pt" style:font-size-asian="11pt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font-size-asian="11pt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ize="11pt" fo:font-style="italic" style:font-size-asian="11pt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_20_Char" style:display-name="Salutation Char" style:family="text" style:parent-style-name="Default_20_Paragraph_20_Font">
      <style:text-properties fo:font-size="11pt" style:font-size-asian="11pt"/>
    </style:style>
    <style:style style:name="Signature_20_Char" style:display-name="Signature Char" style:family="text" style:parent-style-name="Default_20_Paragraph_20_Font" loext:linked-style-name="Signature">
      <style:text-properties fo:font-size="11pt" style:font-size-asian="11pt"/>
    </style:style>
    <style:style style:name="Smart_20_Hyperlink" style:display-name="Smart Hyperlink" style:family="text" style:parent-style-name="Default_20_Paragraph_20_Font">
      <style:text-properties fo:font-size="11pt" style:text-underline-style="dotted" style:text-underline-width="auto" style:text-underline-color="font-color" style:font-size-asian="11pt"/>
    </style:style>
    <style:style style:name="Subtle_20_Emphasis" style:display-name="Subtle Emphasis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 fo:font-size="11pt" style:font-size-asian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595959" loext:opacity="100%" fo:font-size="11pt" fo:background-color="#e6e6e6" style:font-size-asian="11pt">
        <loext:char-complex-color loext:theme-type="dark1" loext:color-type="theme">
          <loext:transformation loext:type="tint" loext:value="3490"/>
        </loext:char-complex-color>
      </style:text-properties>
    </style:style>
    <style:style style:name="KeywordTok" style:family="text">
      <style:text-properties fo:color="#007020" loext:opacity="100%" fo:font-weight="bold" style:font-weight-asian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 style:font-weight-asian="bold"/>
    </style:style>
    <style:style style:name="CommentTok" style:family="text">
      <style:text-properties fo:color="#60a0b0" loext:opacity="100%" fo:font-style="italic" style:font-style-asian="italic"/>
    </style:style>
    <style:style style:name="DocumentationTok" style:family="text">
      <style:text-properties fo:color="#ba2121" loext:opacity="100%" fo:font-style="italic" style:font-style-asian="italic"/>
    </style:style>
    <style:style style:name="AnnotationTok" style:family="text">
      <style:text-properties fo:color="#60a0b0" loext:opacity="100%" fo:font-style="italic" fo:font-weight="bold" style:font-style-asian="italic" style:font-weight-asian="bold"/>
    </style:style>
    <style:style style:name="CommentVarTok" style:family="text">
      <style:text-properties fo:color="#60a0b0" loext:opacity="100%" fo:font-style="italic" fo:font-weight="bold" style:font-style-asian="italic" style:font-weight-asian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 style:font-weight-asian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 style:font-style-asian="italic" style:font-weight-asian="bold"/>
    </style:style>
    <style:style style:name="WarningTok" style:family="text">
      <style:text-properties fo:color="#60a0b0" loext:opacity="100%" fo:font-style="italic" fo:font-weight="bold" style:font-style-asian="italic" style:font-weight-asian="bold"/>
    </style:style>
    <style:style style:name="AlertTok" style:family="text">
      <style:text-properties fo:color="#ff0000" loext:opacity="100%" fo:font-weight="bold" style:font-weight-asian="bold"/>
    </style:style>
    <style:style style:name="ErrorTok" style:family="text">
      <style:text-properties fo:color="#ff0000" loext:opacity="100%" fo:font-weight="bold" style:font-weight-asian="bold"/>
    </style:style>
    <style:style style:name="NormalTok" style:family="text"/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="Aptos" fo:font-family="Aptos" style:font-family-generic="roman" style:font-pitch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>
      <style:text-properties style:font-name="Aptos" fo:font-family="Aptos" style:font-family-generic="roman" style:font-pitch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>
      <style:text-properties style:font-name="Aptos" fo:font-family="Aptos" style:font-family-generic="roman" style:font-pitch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="Aptos" fo:font-family="Aptos" style:font-family-generic="roman" style:font-pitch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="Aptos" fo:font-family="Aptos" style:font-family-generic="roman" style:font-pitch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>
      <style:text-properties style:font-name="Aptos" fo:font-family="Aptos" style:font-family-generic="roman" style:font-pitch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style:font-name="Aptos" fo:font-family="Aptos" style:font-family-generic="roman" style:font-pitch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>
      <style:text-properties style:font-name="Aptos" fo:font-family="Aptos" style:font-family-generic="roman" style:font-pitch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="Aptos" fo:font-family="Aptos" style:font-family-generic="roman" style:font-pitch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="Aptos" fo:font-family="Aptos" style:font-family-generic="roman" style:font-pitch="variable"/>
    </style:style>
    <style:style style:name="ListLabel_20_42" style:display-name="ListLabel 42" style:family="text">
      <style:text-properties style:font-name="Aptos" fo:font-family="Aptos" style:font-family-generic="roman" style:font-pitch="variable"/>
    </style:style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="Aptos" fo:font-family="Aptos" style:font-family-generic="roman" style:font-pitch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in" fo:text-indent="0.3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in" fo:text-indent="0.4in" fo:margin-left="0.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in" fo:text-indent="0.4in" fo:margin-left="0.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0.2in" fo:margin-left="0.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0" loext:num-list-format="%1%." style:num-suffix="." style:num-format="1">
        <style:list-level-properties text:list-level-position-and-space-mode="label-alignment">
          <style:list-level-label-alignment text:label-followed-by="listtab" fo:text-indent="0.2in" fo:margin-left="0.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0.2in" fo:margin-left="0.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0" loext:num-list-format="%1%." style:num-suffix="." style:num-format="1">
        <style:list-level-properties text:list-level-position-and-space-mode="label-alignment">
          <style:list-level-label-alignment text:label-followed-by="listtab" fo:text-indent="0.2in" fo:margin-left="0.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0">
      <text:list-level-style-bullet text:level="1" text:style-name="ListLabel_20_4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.1in" fo:margin-right="0.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/>
      </style:header-first>
      <style:footer>
        <text:p text:style-name="Footer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01:27:48</meta:creation-date>
    <dc:date>2026-05-06T09:30:34.402373500</dc:date>
    <meta:editing-duration>PT1H6M25S</meta:editing-duration>
    <meta:editing-cycles>1</meta:editing-cycles>
    <meta:document-statistic meta:table-count="0" meta:image-count="0" meta:object-count="0" meta:page-count="9" meta:paragraph-count="122" meta:word-count="819" meta:character-count="4384" meta:non-whitespace-character-count="3569"/>
    <meta:generator>LibreOffice/26.2.2.2$Windows_X86_64 LibreOffice_project/1f77d10d6938fd34972958f64b2bcfa54f8b1ba5</meta:generator>
    <meta:user-defined meta:name="AppVersion">16.0000</meta:user-defined>
    <meta:template xlink:type="simple" xlink:actuate="onRequest" xlink:title="TM00002117" xlink:href=""/>
  </office:meta>
</office:document-meta>
</file>